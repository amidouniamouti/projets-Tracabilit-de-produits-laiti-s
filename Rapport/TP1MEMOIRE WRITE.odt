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ef3be" officeooo:paragraph-rsid="000ef3be"/>
    </style:style>
    <style:style style:name="P2" style:family="paragraph" style:parent-style-name="Text_20_body">
      <style:text-properties officeooo:paragraph-rsid="000ef3b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fo:font-weight="normal" officeooo:rsid="000ef3be" officeooo:paragraph-rsid="000ef3be" style:font-weight-asian="normal" style:font-weight-complex="normal"/>
    </style:style>
    <style:style style:name="P7" style:family="paragraph" style:parent-style-name="Text_20_body">
      <style:text-properties officeooo:paragraph-rsid="000f2e17"/>
    </style:style>
    <style:style style:name="P8" style:family="paragraph" style:parent-style-name="Heading_20_2" style:list-style-name=""/>
    <style:style style:name="P9" style:family="paragraph" style:parent-style-name="Heading_20_1">
      <style:paragraph-properties fo:break-before="page"/>
      <style:text-properties officeooo:rsid="0011bb43" officeooo:paragraph-rsid="0011bb43"/>
    </style:style>
    <style:style style:name="P10" style:family="paragraph" style:parent-style-name="Text_20_body">
      <style:text-properties officeooo:paragraph-rsid="0011bb43"/>
    </style:style>
    <style:style style:name="T1" style:family="text">
      <style:text-properties officeooo:rsid="000ef3be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_826044906"/><text:s text:c="9"/><text:span text:style-name="T1">THEME : GESTION DES DECHETS ISSUES DE L’INDUSTRIE ET VALORISATION DES SOUS-PRODUIT DE L’ABATTAGE</text:span><text:bookmark-end text:name="__RefHeading___Toc1_826044906"/></text:h>
      <text:h text:style-name="P1" text:outline-level="1"><text:bookmark text:name="__RefHeading___Toc3_826044906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_826044906" office:name=" THEME : GESTION DES DECHETS ISSUES DE L’INDUSTRIE ET VALORISATION DES SOUS-PRODUIT DE L’ABATTAGE" text:style-name="Index_20_Link" text:visited-style-name="Index_20_Link"><text:s/>THEME : GESTION DES DECHETS ISSUES DE L’INDUSTRIE ET VALORISATION DES SOUS-PRODUIT DE L’ABATTAGE<text:tab/>1</text:a></text:p>
          <text:p text:style-name="P3"><text:a xlink:type="simple" xlink:href="#__RefHeading___Toc5_826044906" office:name="INTRODUCTION" text:style-name="Index_20_Link" text:visited-style-name="Index_20_Link">INTRODUCTION<text:tab/>3</text:a></text:p>
          <text:p text:style-name="P4"><text:a xlink:type="simple" xlink:href="#__RefHeading___Toc7_826044906" office:name="DÉFINITION" text:style-name="Index_20_Link" text:visited-style-name="Index_20_Link">DÉFINITION<text:tab/>3</text:a></text:p>
          <text:p text:style-name="P3"><text:a xlink:type="simple" xlink:href="#__RefHeading___Toc9_826044906" office:name="MÉTHODOLOGIE" text:style-name="Index_20_Link" text:visited-style-name="Index_20_Link">MÉTHODOLOGIE<text:tab/>3</text:a></text:p>
          <text:p text:style-name="P4"><text:a xlink:type="simple" xlink:href="#__RefHeading___Toc11_826044906" office:name="RÉSULTATS" text:style-name="Index_20_Link" text:visited-style-name="Index_20_Link">RÉSULTATS<text:tab/>3</text:a></text:p>
          <text:p text:style-name="P4"><text:a xlink:type="simple" xlink:href="#__RefHeading___Toc199_826044906" office:name="CONCLUSION" text:style-name="Index_20_Link" text:visited-style-name="Index_20_Link">CONCLUSION<text:tab/>3</text:a></text:p>
          <text:p text:style-name="P3"><text:a xlink:type="simple" xlink:href="#__RefHeading___Toc279_826044906" office:name="BIBLIOGRAPHIE" text:style-name="Index_20_Link" text:visited-style-name="Index_20_Link">BIBLIOGRAPHIE<text:tab/>4</text:a></text:p>
        </text:index-body>
      </text:table-of-content>
      <text:p text:style-name="P2"/>
      <text:p text:style-name="P2"/>
      <text:h text:style-name="P5" text:outline-level="1"><text:bookmark-start text:name="__RefHeading___Toc5_826044906"/>INTRODUCTION<text:bookmark-end text:name="__RefHeading___Toc5_826044906"/></text:h>
      <text:h text:style-name="Heading_20_2" text:outline-level="2"><text:bookmark-start text:name="__RefHeading___Toc7_826044906"/>DÉFINITION<text:bookmark-end text:name="__RefHeading___Toc7_826044906"/></text:h>
      <text:h text:style-name="Heading_20_2" text:outline-level="2"/>
      <text:p text:style-name="P6"/>
      <text:p text:style-name="P6"/>
      <text:h text:style-name="Heading_20_1" text:outline-level="1"><text:bookmark-start text:name="__RefHeading___Toc9_826044906"/>MÉTHODOLOGIE<text:bookmark-end text:name="__RefHeading___Toc9_826044906"/></text:h>
      <text:h text:style-name="Heading_20_2" text:outline-level="2"><text:bookmark-start text:name="__RefHeading___Toc11_826044906"/>RÉSULTATS<text:bookmark-end text:name="__RefHeading___Toc11_826044906"/></text:h>
      <text:h text:style-name="Heading_20_2" text:outline-level="2"/>
      <text:p text:style-name="P6"/>
      <text:p text:style-name="P6"/>
      <text:h text:style-name="Heading_20_2" text:outline-level="2"><text:bookmark-start text:name="__RefHeading___Toc199_826044906"/>CONCLUSION<text:bookmark-end text:name="__RefHeading___Toc199_826044906"/></text:h>
      <text:p text:style-name="P7"/>
      <text:p text:style-name="P7"/>
      <text:p text:style-name="P6"/>
      <text:p text:style-name="P6"/>
      <text:h text:style-name="Heading_20_1" text:outline-level="1"><text:bookmark text:name="__RefHeading___Toc13_826044906"/></text:h>
      <text:h text:style-name="P8" text:outline-level="2"/>
      <text:h text:style-name="P9" text:outline-level="1"><text:bookmark-start text:name="__RefHeading___Toc279_826044906"/>BIBLIOGRAPHIE<text:bookmark-end text:name="__RefHeading___Toc279_826044906"/></text:h>
      <text:p text:style-name="P10"/>
      <text:p text:style-name="P10">KADA BENOUNANE, N. R., HACHEM, W., &amp; LABDELLI, S. (2022). VALORISATION DES COPRODUITS D’ABATTAGE: CAS DE VOLAILLE.</text:p>
      <text:p text:style-name="P10">BENOUNANE, K., WISSEM, H., SOUMIA, L., &amp; FATIMA, M. (2022). <text:span text:style-name="T2">VALORISATION DES COPRODUITS D’ABATTAGE: CAS DE VOLAILLE</text:span> (Doctoral dissertation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0ed0" officeooo:paragraph-rsid="00100ed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IAMOUTI AMIDOU <text:s text:c="57"/>INDUSTRIE AGRO-ALIMENTAIRE</text:p>
      </style:header>
      <style:footer>
        <text:p text:style-name="MP2"><text:bookmark-start text:name="PageNumWizard_FOOTER_Style de page par défaut1"/><text:page-number text:select-page="current">4</text:page-number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6:10:36.758537600</meta:creation-date>
    <dc:date>2026-05-16T16:51:07.677811200</dc:date>
    <meta:editing-duration>PT7M20S</meta:editing-duration>
    <meta:editing-cycles>1</meta:editing-cycles>
    <meta:generator>LibreOffice/26.2.3.2$Windows_X86_64 LibreOffice_project/70e089b17412e4cb7773e41413306b17a2328c34</meta:generator>
    <meta:print-date>2026-05-16T16:55:58.456673900</meta:print-date>
    <meta:printed-by>Fichiers PDF</meta:printed-by>
    <meta:document-statistic meta:table-count="0" meta:image-count="0" meta:object-count="0" meta:page-count="4" meta:paragraph-count="19" meta:word-count="91" meta:character-count="721" meta:non-whitespace-character-count="581"/>
  </office:meta>
</office:document-meta>
</file>